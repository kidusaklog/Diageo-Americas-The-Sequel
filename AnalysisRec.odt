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2" style:family="paragraph"/>
  </office:automatic-styles>
  <office:body>
    <office:text text:use-soft-page-breaks="true">
      <text:p text:style-name="P1">Ariel Rollins</text:p>
      <text:p text:style-name="Normal">Analysis Recommendations</text:p>
      <text:list text:style-name="LFO1" text:continue-numbering="true">
        <text:list-item>
          <text:p text:style-name="P2">Underperforming Products</text:p>
        </text:list-item>
        <text:list-item>
          <text:p text:style-name="P3">Average pricing per bottle</text:p>
        </text:list-item>
        <text:list-item>
          <text:p text:style-name="P4">Revenue<text:s/>or Sales<text:s/>by County</text:p>
        </text:list-item>
        <text:list-item>
          <text:p text:style-name="P5">Expanding Distribution (Inventory)</text:p>
        </text:list-item>
      </text:list>
      <text:p text:style-name="Normal">Insights</text:p>
      <text:list text:style-name="LFO2" text:continue-numbering="true">
        <text:list-item>
          <text:p text:style-name="P6">With our shortcomings in the sales of non-whiskey, an expansion in distribution and marketing will lead us to a monopoly in the liquor industry.</text:p>
        </text:list-item>
      </text:list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iel rollins</meta:initial-creator>
    <dc:creator>ariel rollins</dc:creator>
    <meta:creation-date>2026-07-15T02:29:00Z</meta:creation-date>
    <dc:date>2026-07-15T02:29:00Z</dc:date>
    <meta:template xlink:href="Normal" xlink:type="simple"/>
    <meta:editing-cycles>2</meta:editing-cycles>
    <meta:editing-duration>PT240S</meta:editing-duration>
    <meta:user-defined meta:name="GrammarlyDocumentId">bfe9ee78-09de-4084-8256-95ebed1f9e76</meta:user-defined>
    <meta:document-statistic meta:page-count="1" meta:paragraph-count="4" meta:word-count="38" meta:character-count="304" meta:row-count="7" meta:non-whitespace-character-count="270"/>
  </office:meta>
</office:document-meta>
</file>